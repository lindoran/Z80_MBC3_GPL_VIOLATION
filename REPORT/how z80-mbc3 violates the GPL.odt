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48000007487E0E399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ack" svg:font-family="Hack" style:font-adornments="Regular"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3778in" fo:margin-left="0.7097in" table:align="left"/>
    </style:style>
    <style:style style:name="Table1.A" style:family="table-column">
      <style:table-column-properties style:column-width="1.7514in"/>
    </style:style>
    <style:style style:name="Table1.C" style:family="table-column">
      <style:table-column-properties style:column-width="1.875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3.6264in" fo:margin-left="1.3611in" fo:margin-top="0in" fo:margin-bottom="0in" table:align="left" style:writing-mode="page"/>
    </style:style>
    <style:style style:name="Table2.A" style:family="table-column">
      <style:table-column-properties style:column-width="1.1264in"/>
    </style:style>
    <style:style style:name="Table2.B" style:family="table-column">
      <style:table-column-properties style:column-width="1.3736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Table3" style:family="table">
      <style:table-properties style:width="6.6861in" fo:margin-left="-0.0208in" fo:margin-top="0in" fo:margin-bottom="0in" table:align="left" style:writing-mode="page"/>
    </style:style>
    <style:style style:name="Table3.A" style:family="table-column">
      <style:table-column-properties style:column-width="3.0014in"/>
    </style:style>
    <style:style style:name="Table3.B" style:family="table-column">
      <style:table-column-properties style:column-width="1.3083in"/>
    </style:style>
    <style:style style:name="Table3.C" style:family="table-column">
      <style:table-column-properties style:column-width="2.3764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P1" style:family="paragraph" style:parent-style-name="Text_20_body">
      <style:paragraph-properties fo:text-align="start" style:justify-single-word="false"/>
      <style:text-properties officeooo:rsid="001aab6a" officeooo:paragraph-rsid="001aab6a"/>
    </style:style>
    <style:style style:name="P2" style:family="paragraph" style:parent-style-name="Table_20_Contents">
      <style:paragraph-properties fo:text-align="start" style:justify-single-word="false"/>
      <style:text-properties officeooo:rsid="00201486" officeooo:paragraph-rsid="00201486"/>
    </style:style>
    <style:style style:name="P3" style:family="paragraph" style:parent-style-name="Quotations">
      <style:paragraph-properties fo:margin-left="0.3937in" fo:margin-right="0.3937in" fo:text-indent="0in" style:auto-text-indent="false"/>
      <style:text-properties style:font-name="Liberation Mono" officeooo:paragraph-rsid="0022b3ca"/>
    </style:style>
    <style:style style:name="P4" style:family="paragraph" style:parent-style-name="Quotations">
      <style:text-properties style:font-name="Hack" fo:font-size="10pt" style:font-size-asian="10pt" style:font-size-complex="10pt"/>
    </style:style>
    <style:style style:name="P5" style:family="paragraph" style:parent-style-name="Table_20_Contents">
      <style:paragraph-properties fo:text-align="start" style:justify-single-word="false"/>
      <style:text-properties fo:font-weight="bold" style:font-weight-asian="bold" style:font-weight-complex="bold"/>
    </style:style>
    <style:style style:name="P6" style:family="paragraph" style:parent-style-name="Table_20_Contents">
      <style:paragraph-properties fo:text-align="start" style:justify-single-word="false"/>
      <style:text-properties fo:font-weight="bold" officeooo:rsid="00201486" officeooo:paragraph-rsid="00201486" style:font-weight-asian="bold" style:font-weight-complex="bold"/>
    </style:style>
    <style:style style:name="P7" style:family="paragraph" style:parent-style-name="Table_20_Contents">
      <style:paragraph-properties fo:text-align="start" style:justify-single-word="false"/>
    </style:style>
    <style:style style:name="P8" style:family="paragraph" style:parent-style-name="Standard">
      <style:text-properties fo:font-style="normal" fo:font-weight="normal" officeooo:paragraph-rsid="0024a001" style:font-style-asian="normal" style:font-weight-asian="normal" style:font-style-complex="normal" style:font-weight-complex="normal"/>
    </style:style>
    <style:style style:name="P9" style:family="paragraph" style:parent-style-name="Text_20_body">
      <style:text-properties fo:font-style="normal" fo:font-weight="normal" officeooo:paragraph-rsid="0024a001" style:font-style-asian="normal" style:font-weight-asian="normal" style:font-style-complex="normal" style:font-weight-complex="normal"/>
    </style:style>
    <style:style style:name="P10" style:family="paragraph" style:parent-style-name="Standard">
      <style:text-properties fo:font-style="normal" fo:font-weight="normal" officeooo:rsid="0027344d" style:font-style-asian="normal" style:font-weight-asian="normal" style:font-style-complex="normal" style:font-weight-complex="normal"/>
    </style:style>
    <style:style style:name="P11" style:family="paragraph" style:parent-style-name="Text_20_body">
      <style:text-properties fo:font-style="normal" fo:font-weight="normal" officeooo:rsid="0027344d" style:font-style-asian="normal" style:font-weight-asian="normal" style:font-style-complex="normal" style:font-weight-complex="normal"/>
    </style:style>
    <style:style style:name="P12" style:family="paragraph" style:parent-style-name="Text_20_body">
      <style:text-properties fo:font-style="normal" fo:font-weight="normal" officeooo:paragraph-rsid="00256226" style:font-style-asian="normal" style:font-weight-asian="normal" style:font-style-complex="normal" style:font-weight-complex="normal"/>
    </style:style>
    <style:style style:name="P13" style:family="paragraph" style:parent-style-name="Text_20_body">
      <style:paragraph-properties fo:margin-left="0in" fo:margin-right="0in" fo:text-indent="0in" style:auto-text-indent="false"/>
      <style:text-properties fo:font-style="normal" fo:font-weight="normal" officeooo:paragraph-rsid="0027344d" style:font-style-asian="normal" style:font-weight-asian="normal" style:font-style-complex="normal" style:font-weight-complex="normal"/>
    </style:style>
    <style:style style:name="P14" style:family="paragraph" style:parent-style-name="Text_20_body">
      <style:text-properties fo:font-style="normal" fo:font-weight="normal" officeooo:paragraph-rsid="002982a7" style:font-style-asian="normal" style:font-weight-asian="normal" style:font-style-complex="normal" style:font-weight-complex="normal"/>
    </style:style>
    <style:style style:name="P15" style:family="paragraph" style:parent-style-name="Text_20_body">
      <style:text-properties fo:font-style="normal" style:text-underline-style="solid" style:text-underline-width="auto" style:text-underline-color="font-color" fo:font-weight="normal" officeooo:rsid="0027344d" officeooo:paragraph-rsid="0027344d" style:font-style-asian="normal" style:font-weight-asian="normal" style:font-style-complex="normal" style:font-weight-complex="normal"/>
    </style:style>
    <style:style style:name="P16" style:family="paragraph" style:parent-style-name="Table_20_Contents">
      <style:paragraph-properties fo:text-align="start" style:justify-single-word="false"/>
      <style:text-properties fo:font-style="italic" officeooo:rsid="00201486" officeooo:paragraph-rsid="00201486" style:font-style-asian="italic" style:font-style-complex="italic"/>
    </style:style>
    <style:style style:name="P17" style:family="paragraph" style:parent-style-name="Text_20_body">
      <style:text-properties fo:font-style="italic" fo:font-weight="bold" style:font-style-asian="italic" style:font-weight-asian="bold" style:font-style-complex="italic" style:font-weight-complex="bold"/>
    </style:style>
    <style:style style:name="P18" style:family="paragraph" style:parent-style-name="Text_20_body">
      <style:paragraph-properties fo:margin-left="0in" fo:margin-right="0in" fo:text-indent="0in" style:auto-text-indent="false"/>
      <style:text-properties fo:font-style="italic" fo:font-weight="bold" style:font-style-asian="italic" style:font-weight-asian="bold" style:font-style-complex="italic" style:font-weight-complex="bold"/>
    </style:style>
    <style:style style:name="P19" style:family="paragraph" style:parent-style-name="Text_20_body">
      <style:text-properties fo:font-style="italic" fo:font-weight="bold" officeooo:rsid="0027344d" officeooo:paragraph-rsid="0027344d" style:font-style-asian="italic" style:font-weight-asian="bold" style:font-style-complex="italic" style:font-weight-complex="bold"/>
    </style:style>
    <style:style style:name="P20" style:family="paragraph" style:parent-style-name="Text_20_body">
      <style:paragraph-properties fo:text-align="center" style:justify-single-word="false"/>
      <style:text-properties officeooo:rsid="00113551" officeooo:paragraph-rsid="00113551"/>
    </style:style>
    <style:style style:name="P21" style:family="paragraph" style:parent-style-name="Text_20_body">
      <style:paragraph-properties fo:text-align="start" style:justify-single-word="false"/>
      <style:text-properties officeooo:rsid="00113551" officeooo:paragraph-rsid="00113551"/>
    </style:style>
    <style:style style:name="P22" style:family="paragraph" style:parent-style-name="Text_20_body">
      <style:paragraph-properties fo:text-align="start" style:justify-single-word="false"/>
      <style:text-properties officeooo:rsid="00113551" officeooo:paragraph-rsid="00180c62"/>
    </style:style>
    <style:style style:name="P23" style:family="paragraph" style:parent-style-name="Text_20_body">
      <style:paragraph-properties fo:text-align="start" style:justify-single-word="false"/>
      <style:text-properties officeooo:rsid="00113551" officeooo:paragraph-rsid="0018cc5f"/>
    </style:style>
    <style:style style:name="P24" style:family="paragraph" style:parent-style-name="Text_20_body">
      <style:paragraph-properties fo:margin-left="0in" fo:margin-right="0in" fo:text-indent="0in" style:auto-text-indent="false"/>
    </style:style>
    <style:style style:name="P25" style:family="paragraph" style:parent-style-name="Text_20_body">
      <style:text-properties officeooo:paragraph-rsid="001fbd2c"/>
    </style:style>
    <style:style style:name="P26" style:family="paragraph" style:parent-style-name="Text_20_body">
      <style:text-properties officeooo:paragraph-rsid="00201486"/>
    </style:style>
    <style:style style:name="P27" style:family="paragraph" style:parent-style-name="Text_20_body">
      <style:text-properties officeooo:rsid="0020ec18" officeooo:paragraph-rsid="00201486"/>
    </style:style>
    <style:style style:name="P28" style:family="paragraph" style:parent-style-name="Text_20_body">
      <style:paragraph-properties fo:margin-left="0in" fo:margin-right="0in" fo:text-indent="0in" style:auto-text-indent="false"/>
      <style:text-properties officeooo:paragraph-rsid="0022b3ca"/>
    </style:style>
    <style:style style:name="P29" style:family="paragraph" style:parent-style-name="Text_20_body">
      <style:text-properties style:font-name="Liberation Serif" officeooo:rsid="002982a7" officeooo:paragraph-rsid="002b003e"/>
    </style:style>
    <style:style style:name="P30" style:family="paragraph" style:parent-style-name="Text_20_body">
      <style:text-properties style:font-name="Liberation Serif" officeooo:rsid="002982a7" officeooo:paragraph-rsid="002c90af"/>
    </style:style>
    <style:style style:name="P31" style:family="paragraph" style:parent-style-name="Heading_20_2">
      <style:text-properties officeooo:rsid="0018cc5f" officeooo:paragraph-rsid="0018cc5f"/>
    </style:style>
    <style:style style:name="P32" style:family="paragraph" style:parent-style-name="Heading_20_2">
      <style:text-properties officeooo:rsid="001aab6a" officeooo:paragraph-rsid="001aab6a"/>
    </style:style>
    <style:style style:name="P33" style:family="paragraph" style:parent-style-name="Heading_20_2">
      <style:text-properties officeooo:rsid="00201486" officeooo:paragraph-rsid="00201486"/>
    </style:style>
    <style:style style:name="P34" style:family="paragraph" style:parent-style-name="Heading_20_2">
      <style:text-properties officeooo:rsid="0030f3e5" officeooo:paragraph-rsid="0030f3e5"/>
    </style:style>
    <style:style style:name="P35" style:family="paragraph" style:parent-style-name="Heading_20_3">
      <style:text-properties officeooo:rsid="0018cc5f" officeooo:paragraph-rsid="0018cc5f"/>
    </style:style>
    <style:style style:name="P36" style:family="paragraph" style:parent-style-name="Heading_20_4">
      <style:paragraph-properties fo:text-align="center" style:justify-single-word="false"/>
    </style:style>
    <style:style style:name="P37" style:family="paragraph" style:parent-style-name="Standard" style:list-style-name="L1"/>
    <style:style style:name="P38" style:family="paragraph" style:parent-style-name="Standard" style:list-style-name="L2"/>
    <style:style style:name="P39" style:family="paragraph" style:parent-style-name="Standard">
      <style:paragraph-properties fo:text-align="center" style:justify-single-word="false">
        <style:tab-stops/>
      </style:paragraph-properties>
      <style:text-properties style:font-name="Liberation Sans" fo:font-weight="bold" style:font-weight-asian="bold" style:font-weight-complex="bold"/>
    </style:style>
    <style:style style:name="P40" style:family="paragraph" style:parent-style-name="Standard">
      <style:paragraph-properties fo:text-align="center" style:justify-single-word="false">
        <style:tab-stops/>
      </style:paragraph-properties>
      <style:text-properties style:font-name="Liberation Sans"/>
    </style:style>
    <style:style style:name="P41" style:family="paragraph" style:parent-style-name="Standard" style:list-style-name="L3"/>
    <style:style style:name="P42" style:family="paragraph" style:parent-style-name="Standard">
      <style:text-properties fo:font-style="italic" fo:font-weight="bold" style:font-style-asian="italic" style:font-weight-asian="bold" style:font-style-complex="italic" style:font-weight-complex="bold"/>
    </style:style>
    <style:style style:name="P43" style:family="paragraph" style:parent-style-name="Text_20_body" style:list-style-name="L1">
      <style:paragraph-properties fo:margin-left="0in" fo:margin-right="0in" fo:text-indent="0in" style:auto-text-indent="false"/>
    </style:style>
    <style:style style:name="P44" style:family="paragraph" style:parent-style-name="Text_20_body" style:list-style-name="L2">
      <style:paragraph-properties fo:margin-left="0in" fo:margin-right="0in" fo:text-indent="0in" style:auto-text-indent="false"/>
    </style:style>
    <style:style style:name="P45" style:family="paragraph" style:parent-style-name="Text_20_body">
      <style:text-properties fo:font-weight="bold" officeooo:paragraph-rsid="00201486" style:font-weight-asian="bold" style:font-weight-complex="bold"/>
    </style:style>
    <style:style style:name="P46" style:family="paragraph" style:parent-style-name="Text_20_body">
      <style:text-properties style:font-name="Liberation Serif" fo:font-style="normal" style:text-underline-style="solid" style:text-underline-width="auto" style:text-underline-color="font-color" officeooo:rsid="002b003e" officeooo:paragraph-rsid="002c90af" style:font-style-asian="normal" style:font-style-complex="normal"/>
    </style:style>
    <style:style style:name="P47" style:family="paragraph" style:parent-style-name="Text_20_body">
      <style:text-properties style:font-name="Liberation Serif" officeooo:rsid="002b003e" officeooo:paragraph-rsid="002bb782"/>
    </style:style>
    <style:style style:name="P48" style:family="paragraph" style:parent-style-name="Text_20_body">
      <style:text-properties style:font-name="Liberation Serif" officeooo:rsid="002982a7" officeooo:paragraph-rsid="002bb782"/>
    </style:style>
    <style:style style:name="P49" style:family="paragraph" style:parent-style-name="Text_20_body">
      <style:text-properties style:font-name="Liberation Mono" officeooo:rsid="002b003e" officeooo:paragraph-rsid="002b003e"/>
    </style:style>
    <style:style style:name="P50" style:family="paragraph" style:parent-style-name="Text_20_body" style:list-style-name="L3">
      <style:paragraph-properties fo:margin-left="0in" fo:margin-right="0in" fo:text-indent="0in" style:auto-text-indent="false"/>
    </style:style>
    <style:style style:name="P51" style:family="paragraph" style:parent-style-name="Text_20_body">
      <style:text-properties fo:font-style="italic" fo:font-weight="bold" officeooo:rsid="0027344d" officeooo:paragraph-rsid="0027344d" style:font-style-asian="italic" style:font-weight-asian="bold" style:font-style-complex="italic" style:font-weight-complex="bold"/>
    </style:style>
    <style:style style:name="P52" style:family="paragraph" style:parent-style-name="Text_20_body">
      <style:paragraph-properties fo:text-align="start" style:justify-single-word="false"/>
      <style:text-properties fo:font-style="italic" officeooo:rsid="00113551" officeooo:paragraph-rsid="00113551" style:font-style-asian="italic" style:font-style-complex="italic"/>
    </style:style>
    <style:style style:name="P53" style:family="paragraph" style:parent-style-name="Text_20_body">
      <style:paragraph-properties fo:text-align="start" style:justify-single-word="false"/>
      <style:text-properties officeooo:rsid="00113551" officeooo:paragraph-rsid="00113551"/>
    </style:style>
    <style:style style:name="P54" style:family="paragraph" style:parent-style-name="Text_20_body">
      <style:text-properties officeooo:paragraph-rsid="0030f3e5"/>
    </style:style>
    <style:style style:name="P55" style:family="paragraph" style:parent-style-name="Text_20_body">
      <style:paragraph-properties fo:margin-left="0in" fo:margin-right="0in" fo:text-indent="0in" style:auto-text-indent="false"/>
    </style:style>
    <style:style style:name="P56" style:family="paragraph" style:parent-style-name="Text_20_body">
      <style:text-properties officeooo:rsid="00333e4b" officeooo:paragraph-rsid="00333e4b"/>
    </style:style>
    <style:style style:name="P57" style:family="paragraph" style:parent-style-name="Text_20_body">
      <style:text-properties officeooo:paragraph-rsid="00333e4b"/>
    </style:style>
    <style:style style:name="T1" style:family="text">
      <style:text-properties officeooo:rsid="00131ef3"/>
    </style:style>
    <style:style style:name="T2" style:family="text">
      <style:text-properties officeooo:rsid="00150327"/>
    </style:style>
    <style:style style:name="T3" style:family="text">
      <style:text-properties officeooo:rsid="00180c62"/>
    </style:style>
    <style:style style:name="T4" style:family="text">
      <style:text-properties officeooo:rsid="001aab6a"/>
    </style:style>
    <style:style style:name="T5" style:family="text">
      <style:text-properties fo:font-weight="normal" style:font-weight-asian="normal" style:font-weight-complex="normal"/>
    </style:style>
    <style:style style:name="T6" style:family="text">
      <style:text-properties fo:font-weight="normal" officeooo:rsid="001fc036" style:font-weight-asian="normal" style:font-weight-complex="normal"/>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officeooo:rsid="0020ec18"/>
    </style:style>
    <style:style style:name="T13" style:family="text">
      <style:text-properties style:font-name="Liberation Mono"/>
    </style:style>
    <style:style style:name="T14" style:family="text">
      <style:text-properties style:font-name="Liberation Mono" officeooo:rsid="00256226"/>
    </style:style>
    <style:style style:name="T15" style:family="text">
      <style:text-properties fo:font-style="normal" style:text-underline-style="solid" style:text-underline-width="auto" style:text-underline-color="font-color" officeooo:rsid="002b003e" style:font-style-asian="normal" style:font-style-complex="normal"/>
    </style:style>
    <style:style style:name="T16" style:family="text">
      <style:text-properties officeooo:rsid="00256226"/>
    </style:style>
    <style:style style:name="T17" style:family="text">
      <style:text-properties officeooo:rsid="00291ad0"/>
    </style:style>
    <style:style style:name="T18" style:family="text">
      <style:text-properties officeooo:rsid="002982a7"/>
    </style:style>
    <style:style style:name="T19" style:family="text">
      <style:text-properties officeooo:rsid="002b003e"/>
    </style:style>
    <style:style style:name="T20" style:family="text">
      <style:text-properties officeooo:rsid="002c90af"/>
    </style:style>
    <style:style style:name="T21" style:family="text">
      <style:text-properties officeooo:rsid="00333e4b"/>
    </style:style>
    <style:style style:name="T22" style:family="text">
      <style:text-properties officeooo:rsid="0034e75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PL Compliance Issues in Z80‑MBC3</text:p>
      <text:h text:style-name="P36" text:outline-level="4">A Retro DIY Machine With a Modern Licensing Problem</text:h>
      <text:p text:style-name="P20">By David Collins</text:p>
      <text:p text:style-name="P52"/>
      <text:p text:style-name="P52">License note: this document discusses and quotes evidence from GPLv3-covered Z80-MBC2 material. The evidence archive includes the full GPLv3 text in LICENSE and repository-specific attribution notes in NOTICE.md.</text:p>
      <text:p text:style-name="P21"><text:span text:style-name="T11">Provenance note: the developer statement cited in the evidence archive is preserved at EVIDENCE/provenance/Willem_Vrieze_Facebook_20230103.png. </text:span></text:p>
      <text:p text:style-name="P21"><text:span text:style-name="T11"/></text:p>
      <text:p text:style-name="P21"><text:tab/>I don’t usually write pieces like this. Most of the time I’m focused on fun hobbyist projects; things I’m building myself or trying out and sharing with all of you. But this issue hits close to home. The Z80‑MBC3 has been around for a while now, and judging by the activity in its Facebook group, it’s become pretty popular.</text:p>
      <text:p text:style-name="P21"><text:tab/>What matters to me, beyond the joy of building these little computers, is the trust that holds this community together. Open‑source projects only thrive when that trust is respected, protected, and passed on so future hobbyists can enjoy the same sense of discovery we do today.</text:p>
      <text:p text:style-name="P21"><text:tab/>I’m certain I don’t need to dive too deeply into what the GPL is; with Vizio, Bambu Lab, and others in the news lately, it’s become a familiar topic in the circles we all follow. Most of the time, these stories involve large companies with established brands and millions of dollars tied up in legal battles.</text:p>
      <text:p text:style-name="P21"><text:tab/>But what happens when a hobbyist runs into the same problem? Where does a small developer turn when someone blatantly disregards the trust that keeps this community alive, all for personal gain or borrowed accolades?</text:p>
      <text:p text:style-name="P21"><text:tab/>In the end, it often falls to us <text:span text:style-name="T1">in</text:span> the <text:span text:style-name="T1">retro</text:span> community; to speak up, <text:s/>enforce the standards we care about, and vote with our voices and our wallets. And today, that’s exactly what we’re going to do.</text:p>
      <text:p text:style-name="P1"><text:tab/>I tried to provide as much information as I have, but if you want to skip to just the facts behind the actual compliance issue go ahead and skip ahead to the section “Where we are now” if you are already caught up, or you actually were around in the Z80-MBC2 group in 2021 you probably would want to start there.</text:p>
      <text:h text:style-name="P35" text:outline-level="3">What is the Z80-MBC2?</text:h>
      <text:p text:style-name="P23"><text:span text:style-name="T1"><text:tab/>Where do we start? Best to start from the beginning with the original: The Z80-MBC2 is a computer produced by Just4Fun (Fabio Defabis) for free – on the internet for anybody to build and make. <text:s/>Originally based off of the Z80-MBC dubbed the $4 Z80 computer </text:span><text:span text:style-name="T2">(MBC</text:span><text:span text:style-name="T1"> for mobile, </text:span><text:soft-page-break/><text:span text:style-name="T1">breadboard computer</text:span><text:span text:style-name="T2">).</text:span><text:span text:style-name="T1"> <text:s/>A small computer that uses a Atmega32A as an IO controller that can stage the RAM and interface the Z80 at speed using a simple easy to follow wait/grant architecture. <text:s/>The Z80-MBC2 took this design further and produced a kit computer and the basis for several other computers all witch share its form factor. <text:s/>This was immensely popular and beloved. <text:s/>Eventually, Fabio went on to produce several more designs, with similar chips such as the NEC V20 and the Motorola 68008. Simply, just for the fun of it. <text:s/>All of Fabio’s projects are open source, and free for anybody to download and try out including the board fabrication details and schematics. </text:span></text:p>
      <text:p text:style-name="P22"><text:tab/>Much of the community activity around this computer and the whole family of MBC designs took place on Facebook. At the height of the 2020 coronavirus pandemic, the Z80‑MBC2 Facebook group became the center of it all. Countless builds were completed during that time, with users helping each other, sharing fixes, and contributing enhancements. Some of the most impressive work came out of that collaboration, including support for Fuzix, the POSIX‑based UNIX‑like environment for the Z80. The atmosphere was one of camaraderie, generosity, and genuine enthusiasm.</text:p>
      <text:p text:style-name="P22"><text:tab/><text:span text:style-name="T3">T</text:span>he period from 2019 through late 2021 was very formative for me as a maker, and I owe a lot of what I am to Fabio and the wonderful people in the Z80‑MBC2 Facebook group. A lot of things were designed, shared, and improved during that time, all built on the same trust and community spirit that brought us together in the first place.</text:p>
      <text:h text:style-name="P31" text:outline-level="2">The Start of the issue:</text:h>
      <text:p text:style-name="P22"><text:tab/>There’s really a lot that happened to get us to where we are today. At one point, the maker of the Z80‑MBC3 was active in the Z80‑MBC2 group, showing off his designs and trying to drum up interest. At the time I was deep into developing my first 6809 computer, so I wasn’t as active in the scene as others were, but from the posts I did see, the way this maker carried himself felt different, <text:span text:style-name="T4">kind of odd but more Z80 computers was a good thing right?</text:span></text:p>
      <text:p text:style-name="P22"><text:tab/>Before long, he was approached by Fabio and se1veral others in the community, mostly to politely ask if he might consider changing the name. The concern was simple: people joining the group to build a Z80‑MBC2 were getting confused, ordering the wrong thing, and then needing support. Support that was hard to give, because this maker hadn’t released source code or schematics yet, but was already selling computers.</text:p>
      <text:p text:style-name="P22"><text:tab/>At the time, none of this seemed especially alarming, and saying that now makes me feel naive. But in 2021, when this all started, nobody expected things to end up where they are today. Nobody in our little community had ever dealt with anything like this before. We all trusted each other, and that’s right about when things started to get out of hand.</text:p>
      <text:p text:style-name="P22"><text:tab/>People began showing up in the group asking for help. At first we handled things the way we always did; we tried to be helpful. But the tools for flashing were different, there were no schematics, and everything about it felt off compared to what we were used to. It got harder to support people, and folks started getting frustrated. Some even got mad at the wrong maker because of the confusion, and it was starting to look like the maker of the MBC3 wasn’t going to be as helpful as the rest of us were being with our version of <text:span text:style-name="T4">our little</text:span> computer.</text:p>
      <text:h text:style-name="P32" text:outline-level="2"><text:soft-page-break/>Where we are now:</text:h>
      <text:p text:style-name="P25"><text:tab/>So yes, that’s a lot of background for what turned out to be a very easy‑to‑verify GPL violation. Going forward, we’ll refer to the maker behind the Z80‑MBC3 simply as “the maker.” That’s because the focus here is the compliance issue itself. The goal is straightforward: the repository for the derivative work needs to provide the source code and include the GPL license so the project can be brought into compliance. </text:p>
      <text:p text:style-name="P25"/>
      <text:p text:style-name="P25"><text:tab/>This isn’t about defaming anyone or shaming people who bought or built the computer. Most folks in the hobby have no idea there’s a compliance problem at all. They’re just enjoying a project that has brought a lot of people joy over the years, and that’s a wonderful thing. If the maker wants to come forward and explain why the source code has been missing from the repository for nearly five years, that’s entirely up to them. The reason isn’t as important as the outcome.</text:p>
      <text:h text:style-name="Heading_20_2" text:outline-level="2" text:is-list-header="true">So here’s the issue in plain terms:</text:h>
      <text:p text:style-name="Standard">The maker behind the Z80‑MBC3 appears to have used GPLv3‑protected copyleft code in the following non‑compliant ways:</text:p>
      <text:list text:style-name="L1">
        <text:list-item>
          <text:p text:style-name="P43"><text:span text:style-name="Strong_20_Emphasis"><text:span text:style-name="T5">creating a derivative work, </text:span></text:span><text:span text:style-name="Strong_20_Emphasis"><text:span text:style-name="T6">and distributing</text:span></text:span><text:span text:style-name="Strong_20_Emphasis"><text:span text:style-name="T5"> without providing source code</text:span></text:span></text:p>
        </text:list-item>
        <text:list-item>
          <text:p text:style-name="P43"><text:span text:style-name="Strong_20_Emphasis"><text:span text:style-name="T5">denying access to the source code when asked</text:span></text:span></text:p>
        </text:list-item>
        <text:list-item>
          <text:p text:style-name="P37">not citing the GPLv3 license or including it with distributed firmware</text:p>
        </text:list-item>
        <text:list-item>
          <text:p text:style-name="P43"><text:span text:style-name="Strong_20_Emphasis"><text:span text:style-name="T5">selling hardware with GPL‑derived firmware pre‑flashed, without providing source </text:span></text:span><text:span text:style-name="Strong_20_Emphasis"><text:span text:style-name="T6">code</text:span></text:span></text:p>
        </text:list-item>
      </text:list>
      <text:p text:style-name="Standard">The Z80‑MBC3 firmware appears non‑compliant in the following ways:</text:p>
      <text:list text:style-name="L2">
        <text:list-item>
          <text:p text:style-name="P38">The .HEX firmware contains GPLv3‑protected Z80 machine code for the Z80-MBC2 iLoad payload, copied directly from the Z80‑MBC2 sources byte-for-byte.</text:p>
          <text:list>
            <text:list-item>
              <text:p text:style-name="P44">This code is <text:span text:style-name="T7">100% Z80 machine code</text:span>.</text:p>
            </text:list-item>
            <text:list-item>
              <text:p text:style-name="P44">It appears as a structured array inside the Z80‑MBC2 Arduino sketch for the ATmega32A.</text:p>
            </text:list-item>
            <text:list-item>
              <text:p text:style-name="P44">The Z80‑MBC3 .HEX file contains the <text:span text:style-name="T9">same payload</text:span> verbatim.</text:p>
            </text:list-item>
          </text:list>
        </text:list-item>
        <text:list-item>
          <text:p text:style-name="P44"><text:span text:style-name="Strong_20_Emphasis"><text:span text:style-name="T5">The Z80‑MBC3 .HEX contains identical strings and version information</text:span></text:span>, including system messages and loader‑level error codes, which shows the internal dispatch logic is the same as the Z80‑MBC2.</text:p>
        </text:list-item>
        <text:list-item>
          <text:p text:style-name="P38">The IOS opcode vocabulary strongly matches the Z80‑MBC2 interface. When the Z80 requests an I/O function, the firmware uses nearly the same opcode constants as the Z80‑MBC2. This is supporting evidence when read together with the exact iLoad payload match, shared strings, and bus-handshake logic.</text:p>
        </text:list-item>
      </text:list>
      <text:h text:style-name="P33" text:outline-level="2">The specific issues broken down:</text:h>
      <text:p text:style-name="P26"><text:span text:style-name="T10">Embedded Z80 Payload</text:span> — <text:span text:style-name="T10">618-Byte Exact Match </text:span></text:p>
      <text:p text:style-name="P26"><text:tab/>One of the clearest problems is the <text:span text:style-name="Strong_20_Emphasis">iLoad payload issue</text:span>. The Z80‑MBC2 firmware includes a PROGMEM‑stored block of Z80 machine code called <text:span text:style-name="Source_20_Text">boot_A_[]</text:span>. This is the iLoad Intel‑Hex loader for the Z80 CPU. It’s not AVR code. It’s not Arduino code. It’s <text:span text:style-name="Strong_20_Emphasis">raw Z80 machine code</text:span>, embedded as a static array inside the MBC2’s GPL‑licensed source.</text:p>
      <text:p text:style-name="P26"><text:soft-page-break/><text:span text:style-name="T12">I</text:span>n the MBC2 source, it appears like this:</text:p>
      <text:p text:style-name="P3">“const byte boot_A_[] PROGMEM = { 0x31, 0x10, 0xFD, 0x21, 0x52, 0xFD, 0xCD, 0xC6, 0xFE, 0xCD, 0x3E, 0xFF, 0xCD, 0xF4, 0xFD, 0x3E, 0xFF, 0xBC, 0x20, 0x10, 0xBD, 0x20, 0x0D … }”</text:p>
      <text:p text:style-name="P26"><text:span text:style-name="T5"/></text:p>
      <text:p text:style-name="P26"><text:span text:style-name="T5">That array compiles into a </text:span><text:span text:style-name="Strong_20_Emphasis"><text:span text:style-name="T5">618‑byte block</text:span></text:span><text:span text:style-name="T5"> inside the MBC2 </text:span><text:span text:style-name="Source_20_Text"><text:span text:style-name="T5">.hex</text:span></text:span><text:span text:style-name="T5"> file.</text:span></text:p>
      <text:p text:style-name="P26"><text:span text:style-name="T7"/></text:p>
      <text:p text:style-name="P45">Verified match in suspect binary:</text:p>
      <table:table table:name="Table1" table:style-name="Table1">
        <table:table-column table:style-name="Table1.A" table:number-columns-repeated="2"/>
        <table:table-column table:style-name="Table1.C"/>
        <table:table-row>
          <table:table-cell table:style-name="Table1.A1" office:value-type="string">
            <text:p text:style-name="P7"/>
          </table:table-cell>
          <table:table-cell table:style-name="Table1.A1" office:value-type="string">
            <text:p text:style-name="P6">Reference binary</text:p>
          </table:table-cell>
          <table:table-cell table:style-name="Table1.C1" office:value-type="string">
            <text:p text:style-name="P5">Suspect binary</text:p>
          </table:table-cell>
        </table:table-row>
        <table:table-row>
          <table:table-cell table:style-name="Table1.A2" office:value-type="string">
            <text:p text:style-name="P16">Offset</text:p>
          </table:table-cell>
          <table:table-cell table:style-name="Table1.A2" office:value-type="string">
            <text:p text:style-name="P2">0x0582</text:p>
          </table:table-cell>
          <table:table-cell table:style-name="Table1.C2" office:value-type="string">
            <text:p text:style-name="P2">0x440D</text:p>
          </table:table-cell>
        </table:table-row>
        <table:table-row>
          <table:table-cell table:style-name="Table1.A2" office:value-type="string">
            <text:p text:style-name="P16">Match Length</text:p>
          </table:table-cell>
          <table:table-cell table:style-name="Table1.A2" office:value-type="string">
            <text:p text:style-name="P2">618 bytes</text:p>
          </table:table-cell>
          <table:table-cell table:style-name="Table1.C2" office:value-type="string">
            <text:p text:style-name="P2">618 bytes</text:p>
          </table:table-cell>
        </table:table-row>
        <table:table-row>
          <table:table-cell table:style-name="Table1.A2" table:number-columns-spanned="2" office:value-type="string">
            <text:p text:style-name="P16">Match Percentage</text:p>
          </table:table-cell>
          <table:covered-table-cell/>
          <table:table-cell table:style-name="Table1.C2" office:value-type="string">
            <text:p text:style-name="P6">100% match</text:p>
          </table:table-cell>
        </table:table-row>
      </table:table>
      <text:p text:style-name="P26"/>
      <text:p text:style-name="P27"><text:tab/>When the suspect Z80‑MBC3 firmware was converted to raw binary and analyzed, that exact same 618‑byte block appeared inside it — <text:span text:style-name="Strong_20_Emphasis">byte-for-byte</text:span>, with no changes, no reassembly, and no differences in internal jump offsets.</text:p>
      <text:p text:style-name="P24"><text:tab/>The match is perfect.</text:p>
      <text:p text:style-name="P24"><text:tab/>This cannot happen through independent development. Z80 machine code is extremely sensitive to offsets; even a one‑byte shift changes the entire binary. A 618‑byte perfect match means the code was copied directly from the MBC2 source.</text:p>
      <text:p text:style-name="P24">The MBC3 firmware also contains the string:</text:p>
      <text:p text:style-name="P3">“iLoad - Intel-Hex Loader - S200718”</text:p>
      <text:p text:style-name="P28"><text:tab/>That version stamp (“S200718”) is the internal date tag from the MBC2 project. No independently written loader would carry that exact string.</text:p>
      <text:p text:style-name="Standard">This is the most direct technical evidence. Whoever created the MBC3 firmware either copied the iLoad payload directly or modified the MBC2 code and recompiled it. Either way, it is direct use of GPLv3‑protected code, and under GPLv3 the corresponding source and license notices must be provided when the derived firmware is distributed.</text:p>
      <text:p text:style-name="P17"/>
      <text:p text:style-name="P42">Virtual I/O Opcode Constants — 29/30 Matching</text:p>
      <text:p text:style-name="P9"><text:tab/>The Z80‑MBC2 defines a virtual I/O architecture built around a tight dispatch loop and a simple wait/grant handshake. The Z80 CPU communicates with the AVR by writing specific numeric opcodes to I/O ports. When the suspect Z80‑MBC3 firmware was analyzed, the full opcode table from the MBC2 source was searched across all AVR registers.</text:p>
      <text:p text:style-name="Standard">This opcode evidence is supporting evidence rather than the central proof by itself: a raw binary search for CPI rX,&lt;opcode&gt; can include coincidental comparisons elsewhere in the program. Its significance is the pattern: nearly the entire MBC2 virtual I/O vocabulary appears in the suspect firmware, while the one missing opcode, 0x89 SYSIRQ, was a late MBC2 addition.</text:p>
      <text:p text:style-name="Standard">Result: 29 of 30 opcode constants were found in AVR CPI comparison instructions:</text:p>
      <table:table table:name="Table2" table:style-name="Table2">
        <table:table-column table:style-name="Table2.A"/>
        <table:table-column table:style-name="Table2.B"/>
        <table:table-column table:style-name="Table2.A"/>
        <text:soft-page-break/>
        <table:table-row table:style-name="Table2.1">
          <table:table-cell table:style-name="Table2.A1" office:value-type="string">
            <text:p text:style-name="P39">Opcode</text:p>
          </table:table-cell>
          <table:table-cell table:style-name="Table2.A1" office:value-type="string">
            <text:p text:style-name="P39">Function</text:p>
          </table:table-cell>
          <table:table-cell table:style-name="Table2.A1" office:value-type="string">
            <text:p text:style-name="P39">In Suspect</text:p>
          </table:table-cell>
        </table:table-row>
        <table:table-row table:style-name="Table2.1">
          <table:table-cell table:style-name="Table2.A1" office:value-type="string">
            <text:p text:style-name="P40">0x00</text:p>
          </table:table-cell>
          <table:table-cell table:style-name="Table2.A1" office:value-type="string">
            <text:p text:style-name="P40">USER LED</text:p>
          </table:table-cell>
          <table:table-cell table:style-name="Table2.A1" office:value-type="string">
            <text:p text:style-name="P40">Yes</text:p>
          </table:table-cell>
        </table:table-row>
        <table:table-row table:style-name="Table2.1">
          <table:table-cell table:style-name="Table2.A1" office:value-type="string">
            <text:p text:style-name="P40">0x01</text:p>
          </table:table-cell>
          <table:table-cell table:style-name="Table2.A1" office:value-type="string">
            <text:p text:style-name="P40">SERIAL TX</text:p>
          </table:table-cell>
          <table:table-cell table:style-name="Table2.A1" office:value-type="string">
            <text:p text:style-name="P40">Yes</text:p>
          </table:table-cell>
        </table:table-row>
        <table:table-row table:style-name="Table2.1">
          <table:table-cell table:style-name="Table2.A1" office:value-type="string">
            <text:p text:style-name="P40">0x03</text:p>
          </table:table-cell>
          <table:table-cell table:style-name="Table2.A1" office:value-type="string">
            <text:p text:style-name="P40">GPIOA Write</text:p>
          </table:table-cell>
          <table:table-cell table:style-name="Table2.A1" office:value-type="string">
            <text:p text:style-name="P40">Yes</text:p>
          </table:table-cell>
        </table:table-row>
        <table:table-row table:style-name="Table2.1">
          <table:table-cell table:style-name="Table2.A1" office:value-type="string">
            <text:p text:style-name="P40">0x04</text:p>
          </table:table-cell>
          <table:table-cell table:style-name="Table2.A1" office:value-type="string">
            <text:p text:style-name="P40">GPIOB Write</text:p>
          </table:table-cell>
          <table:table-cell table:style-name="Table2.A1" office:value-type="string">
            <text:p text:style-name="P40">Yes</text:p>
          </table:table-cell>
        </table:table-row>
        <table:table-row table:style-name="Table2.1">
          <table:table-cell table:style-name="Table2.A1" office:value-type="string">
            <text:p text:style-name="P40">0x05</text:p>
          </table:table-cell>
          <table:table-cell table:style-name="Table2.A1" office:value-type="string">
            <text:p text:style-name="P40">IODIRA Write</text:p>
          </table:table-cell>
          <table:table-cell table:style-name="Table2.A1" office:value-type="string">
            <text:p text:style-name="P40">Yes</text:p>
          </table:table-cell>
        </table:table-row>
        <table:table-row table:style-name="Table2.1">
          <table:table-cell table:style-name="Table2.A1" office:value-type="string">
            <text:p text:style-name="P40">0x06</text:p>
          </table:table-cell>
          <table:table-cell table:style-name="Table2.A1" office:value-type="string">
            <text:p text:style-name="P40">IODIRB Write</text:p>
          </table:table-cell>
          <table:table-cell table:style-name="Table2.A1" office:value-type="string">
            <text:p text:style-name="P40">Yes</text:p>
          </table:table-cell>
        </table:table-row>
        <table:table-row table:style-name="Table2.1">
          <table:table-cell table:style-name="Table2.A1" office:value-type="string">
            <text:p text:style-name="P40">0x07</text:p>
          </table:table-cell>
          <table:table-cell table:style-name="Table2.A1" office:value-type="string">
            <text:p text:style-name="P40">GPPUA Write</text:p>
          </table:table-cell>
          <table:table-cell table:style-name="Table2.A1" office:value-type="string">
            <text:p text:style-name="P40">Yes</text:p>
          </table:table-cell>
        </table:table-row>
        <table:table-row table:style-name="Table2.1">
          <table:table-cell table:style-name="Table2.A1" office:value-type="string">
            <text:p text:style-name="P40">0x08</text:p>
          </table:table-cell>
          <table:table-cell table:style-name="Table2.A1" office:value-type="string">
            <text:p text:style-name="P40">GPPUB Write</text:p>
          </table:table-cell>
          <table:table-cell table:style-name="Table2.A1" office:value-type="string">
            <text:p text:style-name="P40">Yes</text:p>
          </table:table-cell>
        </table:table-row>
        <table:table-row table:style-name="Table2.1">
          <table:table-cell table:style-name="Table2.A1" office:value-type="string">
            <text:p text:style-name="P40">0x09</text:p>
          </table:table-cell>
          <table:table-cell table:style-name="Table2.A1" office:value-type="string">
            <text:p text:style-name="P40">SELDISK</text:p>
          </table:table-cell>
          <table:table-cell table:style-name="Table2.A1" office:value-type="string">
            <text:p text:style-name="P40">Yes</text:p>
          </table:table-cell>
        </table:table-row>
        <table:table-row table:style-name="Table2.1">
          <table:table-cell table:style-name="Table2.A1" office:value-type="string">
            <text:p text:style-name="P40">0x0A</text:p>
          </table:table-cell>
          <table:table-cell table:style-name="Table2.A1" office:value-type="string">
            <text:p text:style-name="P40">SELTRACK</text:p>
          </table:table-cell>
          <table:table-cell table:style-name="Table2.A1" office:value-type="string">
            <text:p text:style-name="P40">Yes</text:p>
          </table:table-cell>
        </table:table-row>
        <table:table-row table:style-name="Table2.1">
          <table:table-cell table:style-name="Table2.A1" office:value-type="string">
            <text:p text:style-name="P40">0x0B</text:p>
          </table:table-cell>
          <table:table-cell table:style-name="Table2.A1" office:value-type="string">
            <text:p text:style-name="P40">SELSECT</text:p>
          </table:table-cell>
          <table:table-cell table:style-name="Table2.A1" office:value-type="string">
            <text:p text:style-name="P40">Yes</text:p>
          </table:table-cell>
        </table:table-row>
        <table:table-row table:style-name="Table2.1">
          <table:table-cell table:style-name="Table2.A1" office:value-type="string">
            <text:p text:style-name="P40">0x0C</text:p>
          </table:table-cell>
          <table:table-cell table:style-name="Table2.A1" office:value-type="string">
            <text:p text:style-name="P40">WRITESECT</text:p>
          </table:table-cell>
          <table:table-cell table:style-name="Table2.A1" office:value-type="string">
            <text:p text:style-name="P40">Yes</text:p>
          </table:table-cell>
        </table:table-row>
        <table:table-row table:style-name="Table2.1">
          <table:table-cell table:style-name="Table2.A1" office:value-type="string">
            <text:p text:style-name="P40">0x0D</text:p>
          </table:table-cell>
          <table:table-cell table:style-name="Table2.A1" office:value-type="string">
            <text:p text:style-name="P40">SETBANK</text:p>
          </table:table-cell>
          <table:table-cell table:style-name="Table2.A1" office:value-type="string">
            <text:p text:style-name="P40">Yes</text:p>
          </table:table-cell>
        </table:table-row>
        <table:table-row table:style-name="Table2.1">
          <table:table-cell table:style-name="Table2.A1" office:value-type="string">
            <text:p text:style-name="P40">0x0E</text:p>
          </table:table-cell>
          <table:table-cell table:style-name="Table2.A1" office:value-type="string">
            <text:p text:style-name="P40">SETIRQ</text:p>
          </table:table-cell>
          <table:table-cell table:style-name="Table2.A1" office:value-type="string">
            <text:p text:style-name="P40">Yes</text:p>
          </table:table-cell>
        </table:table-row>
        <table:table-row table:style-name="Table2.1">
          <table:table-cell table:style-name="Table2.A1" office:value-type="string">
            <text:p text:style-name="P40">0x0F</text:p>
          </table:table-cell>
          <table:table-cell table:style-name="Table2.A1" office:value-type="string">
            <text:p text:style-name="P40">SETTICK</text:p>
          </table:table-cell>
          <table:table-cell table:style-name="Table2.A1" office:value-type="string">
            <text:p text:style-name="P40">Yes</text:p>
          </table:table-cell>
        </table:table-row>
        <table:table-row table:style-name="Table2.1">
          <table:table-cell table:style-name="Table2.A1" office:value-type="string">
            <text:p text:style-name="P40">0x10</text:p>
          </table:table-cell>
          <table:table-cell table:style-name="Table2.A1" office:value-type="string">
            <text:p text:style-name="P40">SETOPT</text:p>
          </table:table-cell>
          <table:table-cell table:style-name="Table2.A1" office:value-type="string">
            <text:p text:style-name="P40">Yes</text:p>
          </table:table-cell>
        </table:table-row>
        <table:table-row table:style-name="Table2.1">
          <table:table-cell table:style-name="Table2.A1" office:value-type="string">
            <text:p text:style-name="P40">0x11</text:p>
          </table:table-cell>
          <table:table-cell table:style-name="Table2.A1" office:value-type="string">
            <text:p text:style-name="P40">SETSPP</text:p>
          </table:table-cell>
          <table:table-cell table:style-name="Table2.A1" office:value-type="string">
            <text:p text:style-name="P40">Yes</text:p>
          </table:table-cell>
        </table:table-row>
        <table:table-row table:style-name="Table2.1">
          <table:table-cell table:style-name="Table2.A1" office:value-type="string">
            <text:p text:style-name="P40">0x12</text:p>
          </table:table-cell>
          <table:table-cell table:style-name="Table2.A1" office:value-type="string">
            <text:p text:style-name="P40">WRSPP</text:p>
          </table:table-cell>
          <table:table-cell table:style-name="Table2.A1" office:value-type="string">
            <text:p text:style-name="P40">Yes</text:p>
          </table:table-cell>
        </table:table-row>
        <table:table-row table:style-name="Table2.1">
          <table:table-cell table:style-name="Table2.A1" office:value-type="string">
            <text:p text:style-name="P40">0x80</text:p>
          </table:table-cell>
          <table:table-cell table:style-name="Table2.A1" office:value-type="string">
            <text:p text:style-name="P40">USER KEY</text:p>
          </table:table-cell>
          <table:table-cell table:style-name="Table2.A1" office:value-type="string">
            <text:p text:style-name="P40">Yes</text:p>
          </table:table-cell>
        </table:table-row>
        <table:table-row table:style-name="Table2.1">
          <table:table-cell table:style-name="Table2.A1" office:value-type="string">
            <text:p text:style-name="P40">0x81</text:p>
          </table:table-cell>
          <table:table-cell table:style-name="Table2.A1" office:value-type="string">
            <text:p text:style-name="P40">GPIOA Read</text:p>
          </table:table-cell>
          <table:table-cell table:style-name="Table2.A1" office:value-type="string">
            <text:p text:style-name="P40">Yes</text:p>
          </table:table-cell>
        </table:table-row>
        <table:table-row table:style-name="Table2.1">
          <table:table-cell table:style-name="Table2.A1" office:value-type="string">
            <text:p text:style-name="P40">0x82</text:p>
          </table:table-cell>
          <table:table-cell table:style-name="Table2.A1" office:value-type="string">
            <text:p text:style-name="P40">GPIOB Read</text:p>
          </table:table-cell>
          <table:table-cell table:style-name="Table2.A1" office:value-type="string">
            <text:p text:style-name="P40">Yes</text:p>
          </table:table-cell>
        </table:table-row>
        <table:table-row table:style-name="Table2.1">
          <table:table-cell table:style-name="Table2.A1" office:value-type="string">
            <text:p text:style-name="P40">0x83</text:p>
          </table:table-cell>
          <table:table-cell table:style-name="Table2.A1" office:value-type="string">
            <text:p text:style-name="P40">SYSFLAGS</text:p>
          </table:table-cell>
          <table:table-cell table:style-name="Table2.A1" office:value-type="string">
            <text:p text:style-name="P40">Yes</text:p>
          </table:table-cell>
        </table:table-row>
        <table:table-row table:style-name="Table2.1">
          <table:table-cell table:style-name="Table2.A1" office:value-type="string">
            <text:p text:style-name="P40">0x84</text:p>
          </table:table-cell>
          <table:table-cell table:style-name="Table2.A1" office:value-type="string">
            <text:p text:style-name="P40">DATETIME</text:p>
          </table:table-cell>
          <table:table-cell table:style-name="Table2.A1" office:value-type="string">
            <text:p text:style-name="P40">Yes</text:p>
          </table:table-cell>
        </table:table-row>
        <table:table-row table:style-name="Table2.1">
          <table:table-cell table:style-name="Table2.A1" office:value-type="string">
            <text:p text:style-name="P40">0x85</text:p>
          </table:table-cell>
          <table:table-cell table:style-name="Table2.A1" office:value-type="string">
            <text:p text:style-name="P40">ERRDISK</text:p>
          </table:table-cell>
          <table:table-cell table:style-name="Table2.A1" office:value-type="string">
            <text:p text:style-name="P40">Yes</text:p>
          </table:table-cell>
        </table:table-row>
        <table:table-row table:style-name="Table2.1">
          <table:table-cell table:style-name="Table2.A1" office:value-type="string">
            <text:p text:style-name="P40">0x86</text:p>
          </table:table-cell>
          <table:table-cell table:style-name="Table2.A1" office:value-type="string">
            <text:p text:style-name="P40">READSECT</text:p>
          </table:table-cell>
          <table:table-cell table:style-name="Table2.A1" office:value-type="string">
            <text:p text:style-name="P40">Yes</text:p>
          </table:table-cell>
        </table:table-row>
        <table:table-row table:style-name="Table2.1">
          <table:table-cell table:style-name="Table2.A1" office:value-type="string">
            <text:p text:style-name="P40">0x87</text:p>
          </table:table-cell>
          <table:table-cell table:style-name="Table2.A1" office:value-type="string">
            <text:p text:style-name="P40">SDMOUNT</text:p>
          </table:table-cell>
          <table:table-cell table:style-name="Table2.A1" office:value-type="string">
            <text:p text:style-name="P40">Yes</text:p>
          </table:table-cell>
        </table:table-row>
        <table:table-row table:style-name="Table2.1">
          <table:table-cell table:style-name="Table2.A1" office:value-type="string">
            <text:p text:style-name="P40">0x88</text:p>
          </table:table-cell>
          <table:table-cell table:style-name="Table2.A1" office:value-type="string">
            <text:p text:style-name="P40">ATXBUFF</text:p>
          </table:table-cell>
          <table:table-cell table:style-name="Table2.A1" office:value-type="string">
            <text:p text:style-name="P40">Yes</text:p>
          </table:table-cell>
        </table:table-row>
        <table:table-row table:style-name="Table2.1">
          <table:table-cell table:style-name="Table2.A1" office:value-type="string">
            <text:p text:style-name="P40">0x89</text:p>
          </table:table-cell>
          <table:table-cell table:style-name="Table2.A1" office:value-type="string">
            <text:p text:style-name="P40">SYSIRQ</text:p>
          </table:table-cell>
          <table:table-cell table:style-name="Table2.A1" office:value-type="string">
            <text:p text:style-name="P40">No</text:p>
          </table:table-cell>
        </table:table-row>
        <table:table-row table:style-name="Table2.1">
          <table:table-cell table:style-name="Table2.A1" office:value-type="string">
            <text:p text:style-name="P40">0x8A</text:p>
          </table:table-cell>
          <table:table-cell table:style-name="Table2.A1" office:value-type="string">
            <text:p text:style-name="P40">GETSPP</text:p>
          </table:table-cell>
          <table:table-cell table:style-name="Table2.A1" office:value-type="string">
            <text:p text:style-name="P40">Yes</text:p>
          </table:table-cell>
        </table:table-row>
        <table:table-row table:style-name="Table2.1">
          <table:table-cell table:style-name="Table2.A1" office:value-type="string">
            <text:p text:style-name="P40">0xFF</text:p>
          </table:table-cell>
          <table:table-cell table:style-name="Table2.A1" office:value-type="string">
            <text:p text:style-name="P40">No operation</text:p>
          </table:table-cell>
          <table:table-cell table:style-name="Table2.A1" office:value-type="string">
            <text:p text:style-name="P40">Yes</text:p>
          </table:table-cell>
        </table:table-row>
      </table:table>
      <text:p text:style-name="Standard"/>
      <text:p text:style-name="P8"/>
      <text:p text:style-name="P12"><text:tab/>The missing <text:span text:style-name="Source_20_Text">SYSIRQ</text:span> (0x89) opcode was added late in the MBC2 development cycle. Its absence in the MBC3 firmware lines up with the idea that this version was ported from an earlier MBC2 revision <text:span text:style-name="T16">(version </text:span><text:span text:style-name="T13">S200718</text:span><text:span text:style-name="T14">),</text:span> not the final one; <text:span text:style-name="T16">this</text:span> further supports that it was derived from a specific known version of the MBC2 source tree.</text:p>
      <text:p text:style-name="Standard">The odds of independently designing a Z80 peripheral system that uses nearly the entire same numeric opcode vocabulary, in the same roles, are extremely low. This pattern does not carry the same weight as the exact 618-byte iLoad payload match, but it strongly supports the conclusion that the MBC3 firmware was derived from the MBC2 IOS design.</text:p>
      <text:p text:style-name="P24"><text:tab/>To fully confirm this, deeper disassembly would be needed, but based on the opcode behavior and the way iLoad and other compatible programs run identically on both systems, the evidence points strongly to a direct port of the MBC2 firmware.</text:p>
      <text:p text:style-name="P18"/>
      <text:p text:style-name="P42">String Literals — 24 Meaningful Verbatim Matches</text:p>
      <text:p text:style-name="P13"><text:tab/>Where the overall analysis really started was with strings. Strings are stored in the binary exactly as they appear when sent over serial, so standard tools like <text:span text:style-name="Source_20_Text">grep</text:span>, <text:span text:style-name="Source_20_Text">strings</text:span>, and other POSIX utilities can pull them out with simple shell scripts. This made it the easiest place to begin.</text:p>
      <text:p text:style-name="Standard"><text:soft-page-break/>From the suspect Z80‑MBC3 firmware, 58 strings were extracted. Of those, 25 extractor entries appear in both binaries; one entry is whitespace-only padding, leaving 24 meaningful non-whitespace string matches. These are not generic messages, and many of them are highly specific to the MBC2 firmware. These include menu text, error messages, and filenames used by the virtual ROM loader.</text:p>
      <text:p text:style-name="P13"/>
      <text:p text:style-name="P15">The verified offsets follow:</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Standard">String</text:p>
          </table:table-cell>
          <table:table-cell table:style-name="Table3.A1" office:value-type="string">
            <text:p text:style-name="Standard">Suspect Offset</text:p>
          </table:table-cell>
          <table:table-cell table:style-name="Table3.A1" office:value-type="string">
            <text:p text:style-name="Standard">Notes</text:p>
          </table:table-cell>
        </table:table-row>
        <table:table-row table:style-name="Table3.1">
          <table:table-cell table:style-name="Table3.A1" office:value-type="string">
            <text:p text:style-name="Standard">0: No change (</text:p>
          </table:table-cell>
          <table:table-cell table:style-name="Table3.A1" office:value-type="string">
            <text:p text:style-name="Standard">0x0371</text:p>
          </table:table-cell>
          <table:table-cell table:style-name="Table3.A1" office:value-type="string">
            <text:p text:style-name="Standard">Boot/menu option text</text:p>
          </table:table-cell>
        </table:table-row>
        <table:table-row table:style-name="Table3.1">
          <table:table-cell table:style-name="Table3.A1" office:value-type="string">
            <text:p text:style-name="Standard">AUTOBOOT.BIN</text:p>
          </table:table-cell>
          <table:table-cell table:style-name="Table3.A1" office:value-type="string">
            <text:p text:style-name="Standard">0x4374</text:p>
          </table:table-cell>
          <table:table-cell table:style-name="Table3.A1" office:value-type="string">
            <text:p text:style-name="Standard">Virtual ROM filename</text:p>
          </table:table-cell>
        </table:table-row>
        <table:table-row table:style-name="Table3.1">
          <table:table-cell table:style-name="Table3.A1" office:value-type="string">
            <text:p text:style-name="Standard">Address violation!</text:p>
          </table:table-cell>
          <table:table-cell table:style-name="Table3.A1" office:value-type="string">
            <text:p text:style-name="Standard">0x44DE</text:p>
          </table:table-cell>
          <table:table-cell table:style-name="Table3.A1" office:value-type="string">
            <text:p text:style-name="Standard">iLoad error</text:p>
          </table:table-cell>
        </table:table-row>
        <table:table-row table:style-name="Table3.1">
          <table:table-cell table:style-name="Table3.A1" office:value-type="string">
            <text:p text:style-name="Standard">BASIC47.BIN</text:p>
          </table:table-cell>
          <table:table-cell table:style-name="Table3.A1" office:value-type="string">
            <text:p text:style-name="Standard">0x4381</text:p>
          </table:table-cell>
          <table:table-cell table:style-name="Table3.A1" office:value-type="string">
            <text:p text:style-name="Standard">Virtual ROM filename</text:p>
          </table:table-cell>
        </table:table-row>
        <table:table-row table:style-name="Table3.1">
          <table:table-cell table:style-name="Table3.A1" office:value-type="string">
            <text:p text:style-name="Standard">COS.BIN</text:p>
          </table:table-cell>
          <table:table-cell table:style-name="Table3.A1" office:value-type="string">
            <text:p text:style-name="Standard">0x43C5</text:p>
          </table:table-cell>
          <table:table-cell table:style-name="Table3.A1" office:value-type="string">
            <text:p text:style-name="Standard">Virtual ROM filename</text:p>
          </table:table-cell>
        </table:table-row>
        <table:table-row table:style-name="Table3.1">
          <table:table-cell table:style-name="Table3.A1" office:value-type="string">
            <text:p text:style-name="Standard">CPM22.BIN</text:p>
          </table:table-cell>
          <table:table-cell table:style-name="Table3.A1" office:value-type="string">
            <text:p text:style-name="Standard">0x4399</text:p>
          </table:table-cell>
          <table:table-cell table:style-name="Table3.A1" office:value-type="string">
            <text:p text:style-name="Standard">Virtual ROM filename</text:p>
          </table:table-cell>
        </table:table-row>
        <table:table-row table:style-name="Table3.1">
          <table:table-cell table:style-name="Table3.A1" office:value-type="string">
            <text:p text:style-name="Standard">CPMLDR.COM</text:p>
          </table:table-cell>
          <table:table-cell table:style-name="Table3.A1" office:value-type="string">
            <text:p text:style-name="Standard">0x43AE</text:p>
          </table:table-cell>
          <table:table-cell table:style-name="Table3.A1" office:value-type="string">
            <text:p text:style-name="Standard">Virtual ROM filename</text:p>
          </table:table-cell>
        </table:table-row>
        <table:table-row table:style-name="Table3.1">
          <table:table-cell table:style-name="Table3.A1" office:value-type="string">
            <text:p text:style-name="Standard">Checksum error!</text:p>
          </table:table-cell>
          <table:table-cell table:style-name="Table3.A1" office:value-type="string">
            <text:p text:style-name="Standard">0x44C6</text:p>
          </table:table-cell>
          <table:table-cell table:style-name="Table3.A1" office:value-type="string">
            <text:p text:style-name="Standard">iLoad error</text:p>
          </table:table-cell>
        </table:table-row>
        <table:table-row table:style-name="Table3.1">
          <table:table-cell table:style-name="Table3.A1" office:value-type="string">
            <text:p text:style-name="Standard">DSxNAM.DAT</text:p>
          </table:table-cell>
          <table:table-cell table:style-name="Table3.A1" office:value-type="string">
            <text:p text:style-name="Standard">0x4685</text:p>
          </table:table-cell>
          <table:table-cell table:style-name="Table3.A1" office:value-type="string">
            <text:p text:style-name="Standard">Virtual disk naming convention</text:p>
          </table:table-cell>
        </table:table-row>
        <table:table-row table:style-name="Table3.1">
          <table:table-cell table:style-name="Table3.A1" office:value-type="string">
            <text:p text:style-name="Standard">DSxNyy.DSK</text:p>
          </table:table-cell>
          <table:table-cell table:style-name="Table3.A1" office:value-type="string">
            <text:p text:style-name="Standard">0x4690</text:p>
          </table:table-cell>
          <table:table-cell table:style-name="Table3.A1" office:value-type="string">
            <text:p text:style-name="Standard">Virtual disk naming convention</text:p>
          </table:table-cell>
        </table:table-row>
        <table:table-row table:style-name="Table3.1">
          <table:table-cell table:style-name="Table3.A1" office:value-type="string">
            <text:p text:style-name="Standard">Disk Set </text:p>
          </table:table-cell>
          <table:table-cell table:style-name="Table3.A1" office:value-type="string">
            <text:p text:style-name="Standard">0x0486</text:p>
          </table:table-cell>
          <table:table-cell table:style-name="Table3.A1" office:value-type="string">
            <text:p text:style-name="Standard">Disk management UI</text:p>
          </table:table-cell>
        </table:table-row>
        <table:table-row table:style-name="Table3.1">
          <table:table-cell table:style-name="Table3.A1" office:value-type="string">
            <text:p text:style-name="Standard">Enter your choice &gt;</text:p>
          </table:table-cell>
          <table:table-cell table:style-name="Table3.A1" office:value-type="string">
            <text:p text:style-name="Standard">0x029D</text:p>
          </table:table-cell>
          <table:table-cell table:style-name="Table3.A1" office:value-type="string">
            <text:p text:style-name="Standard">Menu prompt</text:p>
          </table:table-cell>
        </table:table-row>
        <table:table-row table:style-name="Table3.1">
          <table:table-cell table:style-name="Table3.A1" office:value-type="string">
            <text:p text:style-name="Standard">FORTH13.BIN</text:p>
          </table:table-cell>
          <table:table-cell table:style-name="Table3.A1" office:value-type="string">
            <text:p text:style-name="Standard">0x438D</text:p>
          </table:table-cell>
          <table:table-cell table:style-name="Table3.A1" office:value-type="string">
            <text:p text:style-name="Standard">Virtual ROM filename</text:p>
          </table:table-cell>
        </table:table-row>
        <table:table-row table:style-name="Table3.1">
          <table:table-cell table:style-name="Table3.A1" office:value-type="string">
            <text:p text:style-name="Standard">IOS: Check SD and press a key to repeat</text:p>
          </table:table-cell>
          <table:table-cell table:style-name="Table3.A1" office:value-type="string">
            <text:p text:style-name="Standard">0x03B3</text:p>
          </table:table-cell>
          <table:table-cell table:style-name="Table3.A1" office:value-type="string">
            <text:p text:style-name="Standard">SD error prompt</text:p>
          </table:table-cell>
        </table:table-row>
        <table:table-row table:style-name="Table3.1">
          <table:table-cell table:style-name="Table3.A1" office:value-type="string">
            <text:p text:style-name="Standard">IOS: Current </text:p>
          </table:table-cell>
          <table:table-cell table:style-name="Table3.A1" office:value-type="string">
            <text:p text:style-name="Standard">0x022B</text:p>
          </table:table-cell>
          <table:table-cell table:style-name="Table3.A1" office:value-type="string">
            <text:p text:style-name="Standard">Status/menu text</text:p>
          </table:table-cell>
        </table:table-row>
        <table:table-row table:style-name="Table3.1">
          <table:table-cell table:style-name="Table3.A1" office:value-type="string">
            <text:p text:style-name="Standard">IOS: Select boot mode or system parameters:</text:p>
          </table:table-cell>
          <table:table-cell table:style-name="Table3.A1" office:value-type="string">
            <text:p text:style-name="Standard">0x0383</text:p>
          </table:table-cell>
          <table:table-cell table:style-name="Table3.A1" office:value-type="string">
            <text:p text:style-name="Standard">Main menu header</text:p>
          </table:table-cell>
        </table:table-row>
        <table:table-row table:style-name="Table3.1">
          <table:table-cell table:style-name="Table3.A1" office:value-type="string">
            <text:p text:style-name="Standard">Load error - System halted</text:p>
          </table:table-cell>
          <table:table-cell table:style-name="Table3.A1" office:value-type="string">
            <text:p text:style-name="Standard">0x4485</text:p>
          </table:table-cell>
          <table:table-cell table:style-name="Table3.A1" office:value-type="string">
            <text:p text:style-name="Standard">Fatal iLoad error</text:p>
          </table:table-cell>
        </table:table-row>
        <table:table-row table:style-name="Table3.1">
          <table:table-cell table:style-name="Table3.A1" office:value-type="string">
            <text:p text:style-name="Standard">QPMLDR.BIN</text:p>
          </table:table-cell>
          <table:table-cell table:style-name="Table3.A1" office:value-type="string">
            <text:p text:style-name="Standard">0x43A3</text:p>
          </table:table-cell>
          <table:table-cell table:style-name="Table3.A1" office:value-type="string">
            <text:p text:style-name="Standard">Virtual ROM filename</text:p>
          </table:table-cell>
        </table:table-row>
        <table:table-row table:style-name="Table3.1">
          <table:table-cell table:style-name="Table3.A1" office:value-type="string">
            <text:p text:style-name="Standard">Starting Address: </text:p>
          </table:table-cell>
          <table:table-cell table:style-name="Table3.A1" office:value-type="string">
            <text:p text:style-name="Standard">0x4472</text:p>
          </table:table-cell>
          <table:table-cell table:style-name="Table3.A1" office:value-type="string">
            <text:p text:style-name="Standard">iLoad prompt</text:p>
          </table:table-cell>
        </table:table-row>
        <table:table-row table:style-name="Table3.1">
          <table:table-cell table:style-name="Table3.A1" office:value-type="string">
            <text:p text:style-name="Standard">Syntax error!</text:p>
          </table:table-cell>
          <table:table-cell table:style-name="Table3.A1" office:value-type="string">
            <text:p text:style-name="Standard">0x44B8</text:p>
          </table:table-cell>
          <table:table-cell table:style-name="Table3.A1" office:value-type="string">
            <text:p text:style-name="Standard">iLoad error</text:p>
          </table:table-cell>
        </table:table-row>
        <table:table-row table:style-name="Table3.1">
          <table:table-cell table:style-name="Table3.A1" office:value-type="string">
            <text:p text:style-name="Standard">UCSDLDR.BIN</text:p>
          </table:table-cell>
          <table:table-cell table:style-name="Table3.A1" office:value-type="string">
            <text:p text:style-name="Standard">0x43B9</text:p>
          </table:table-cell>
          <table:table-cell table:style-name="Table3.A1" office:value-type="string">
            <text:p text:style-name="Standard">Virtual ROM filename</text:p>
          </table:table-cell>
        </table:table-row>
        <table:table-row table:style-name="Table3.1">
          <table:table-cell table:style-name="Table3.A1" office:value-type="string">
            <text:p text:style-name="Standard">Waiting input stream...</text:p>
          </table:table-cell>
          <table:table-cell table:style-name="Table3.A1" office:value-type="string">
            <text:p text:style-name="Standard">0x44A0</text:p>
          </table:table-cell>
          <table:table-cell table:style-name="Table3.A1" office:value-type="string">
            <text:p text:style-name="Standard">iLoad status message</text:p>
          </table:table-cell>
        </table:table-row>
        <table:table-row table:style-name="Table3.1">
          <table:table-cell table:style-name="Table3.A1" office:value-type="string">
            <text:p text:style-name="Standard">iLoad - Intel-Hex Loader - S200718</text:p>
          </table:table-cell>
          <table:table-cell table:style-name="Table3.A1" office:value-type="string">
            <text:p text:style-name="Standard">0x444F</text:p>
          </table:table-cell>
          <table:table-cell table:style-name="Table3.A1" office:value-type="string">
            <text:p text:style-name="Standard">Carries MBC2 version date</text:p>
          </table:table-cell>
        </table:table-row>
        <table:table-row table:style-name="Table3.1">
          <table:table-cell table:style-name="Table3.A1" office:value-type="string">
            <text:p text:style-name="Standard">iLoad: </text:p>
          </table:table-cell>
          <table:table-cell table:style-name="Table3.A1" office:value-type="string">
            <text:p text:style-name="Standard">0x44D6</text:p>
          </table:table-cell>
          <table:table-cell table:style-name="Table3.A1" office:value-type="string">
            <text:p text:style-name="Standard">iLoad message prefix</text:p>
          </table:table-cell>
        </table:table-row>
      </table:table>
      <text:p text:style-name="Standard"/>
      <text:p text:style-name="P11"><text:tab/>The virtual disk filenames (<text:span text:style-name="Source_20_Text">BASIC47.BIN</text:span>, <text:span text:style-name="Source_20_Text">FORTH13.BIN</text:span>, <text:span text:style-name="Source_20_Text">CPM22.BIN</text:span>, and so on) are especially important. These filenames come directly from the MBC2’s virtual ROM system. An independently written Z80 SBC firmware could have used any filenames at all. Choosing these exact names strongly suggests direct copying of the MBC2’s file access logic.</text:p>
      <text:p text:style-name="P24"><text:tab/>While it’s technically possible that some of these messages could come from reverse engineering, the combination of filenames, menu text, error messages, and the internal iLoad version string makes that unlikely. A unique UI would normally have its own error strings, its own menu layout, and its own naming conventions. The fact that these match the MBC2 firmware byte‑for‑byte is more than coincidence; it’s <text:span text:style-name="T17">an</text:span> evidence <text:span text:style-name="T17">trail</text:span> of direct reuse of GPL‑protected code.</text:p>
      <text:p text:style-name="P10"/>
      <text:p text:style-name="P19"/>
      <text:p text:style-name="P19"/>
      <text:p text:style-name="P19"/>
      <text:p text:style-name="P19"><text:soft-page-break/>Z80 Bus Handshake — Identical Logic Structure</text:p>
      <text:p text:style-name="P14"><text:tab/>The core of both firmware's is a polling loop that monitors the Z80 bus for I/O transactions. <text:s/><text:span text:style-name="T20">The firmware has to have a way to interface the bus, without causing a issue during its Z80 free-run state. <text:s/>In other words, the Z80 is mastering the bus and using the AVR micro-controller in the case of both boards as a specialized IO controller with a specific interface.</text:span></text:p>
      <text:p text:style-name="P14">The logic sequence in both <text:span text:style-name="T18">projects </text:span>is <text:span text:style-name="T18">simplified</text:span>:</text:p>
      <text:p text:style-name="P14"/>
      <text:p text:style-name="P30"><draw:frame draw:style-name="fr1" draw:name="Image1" text:anchor-type="char" svg:x="0.0146in" svg:y="-0.0583in" svg:width="3.7354in" svg:height="3.7354in" draw:z-index="0"><draw:image xlink:href="Pictures/1000000000000748000007487E0E3995.png" xlink:type="simple" xlink:show="embed" xlink:actuate="onLoad" draw:mime-type="image/png"/></draw:frame><text:line-break/><text:line-break/><text:line-break/><text:line-break/><text:tab/>While the the write request loop is similar and inherently locked to the main state machine. <text:s/>The Code for both projects is tied specifically to this logic and both projects clearly use it to dispatch all IO functions as stated above. <text:s text:c="2"/><text:span text:style-name="T19">The Z80-MBC3 project follows the same logical loop based on reverse engineering the disassembly code in the underlying ways:<text:line-break/><text:line-break/><text:line-break/><text:line-break/><text:line-break/><text:line-break/><text:line-break/></text:span></text:p>
      <text:p text:style-name="P30"><text:span text:style-name="T15"/></text:p>
      <text:p text:style-name="P46">Z80-MBC2 source (S220718-R290823_IOS-Z80-MBC2.ino): </text:p>
      <text:p text:style-name="P29"/>
      <text:p text:style-name="P49">// Pin definitions: WAIT_=PB3, AD0=PC2, WR_=PC3</text:p>
      <text:p text:style-name="P49">if (!digitalRead(WAIT_)) {</text:p>
      <text:p text:style-name="P49"><text:tab/>if (digitalRead(A0_)) {</text:p>
      <text:p text:style-name="P49"><text:tab/><text:tab/>if (!digitalRead(WR_)) {</text:p>
      <text:p text:style-name="P49"><text:tab/><text:tab/><text:tab/>ioOpcode = PINA; // store opcode from data bus</text:p>
      <text:p text:style-name="P49"><text:tab/><text:tab/><text:tab/>digitalWrite(WAIT_, HIGH); // release WAIT</text:p>
      <text:p text:style-name="P49"><text:tab/><text:tab/>}</text:p>
      <text:p text:style-name="P49"><text:tab/>}</text:p>
      <text:p text:style-name="P49">}</text:p>
      <text:p text:style-name="Quotations"><text:soft-page-break/><text:span text:style-name="T8">Z80-MBC3 disassembly (verified at 0x193C):</text:span> </text:p>
      <text:p text:style-name="P4">193c: <text:s text:c="3"/>16 99 <text:s text:c="3"/><text:span text:style-name="T7">sbic 0x02, 6</text:span> <text:s/>;skip if VPORTA bit 6 (PA6/WAIT) clear</text:p>
      <text:p text:style-name="P4">193e: <text:s text:c="3"/>12 c0 <text:s text:c="3"/><text:span text:style-name="T7">rjmp .+36</text:span> <text:s text:c="5"/>;WAIT not active — loop back</text:p>
      <text:p text:style-name="P4">1940: <text:s text:c="3"/>11 99 <text:s text:c="3"/><text:span text:style-name="T7">sbic 0x02, 1</text:span> <text:s text:c="2"/>;skip if VPORTA bit 1 (PA1/A0) clear</text:p>
      <text:p text:style-name="P4">1942: <text:s text:c="3"/>42 c0 <text:s text:c="3"/><text:span text:style-name="T7">rjmp .+132</text:span> <text:s text:c="4"/>;A0=0 (read cycle) — branch</text:p>
      <text:p text:style-name="P4">1944: <text:s text:c="3"/>8a b1 <text:s text:c="3"/><text:span text:style-name="T7">in r24, 0x0a</text:span> <text:s text:c="2"/>;read VPORTC</text:p>
      <text:p text:style-name="P4">194a: <text:s text:c="3"/>83 ff <text:s text:c="3"/><text:span text:style-name="T7">sbrs r24, 3</text:span> <text:s text:c="3"/>;skip if VPORTC bit 3 (PC3/WR) set</text:p>
      <text:p text:style-name="P4">194c: <text:s text:c="3"/>28 c1 <text:s text:c="3"/><text:span text:style-name="T7">rjmp .+592 </text:span><text:s text:c="4"/>;WR not active — branch</text:p>
      <text:p text:style-name="P4">194e: <text:s text:c="3"/>8e b1 <text:s text:c="3"/><text:span text:style-name="T7">in r24, 0x0e</text:span> <text:s text:c="2"/>;read data bus (VPORTE = data)</text:p>
      <text:p text:style-name="P4">1950: 80 93 6e 31 <text:span text:style-name="T7">sts 0x316E,r24</text:span> ;store as ioOpcode</text:p>
      <text:p text:style-name="P4">1954: 10 93 80 01 <text:span text:style-name="T7">sts 0x0180,r17</text:span> ;release WAIT line</text:p>
      <text:p text:style-name="P48"><text:span text:style-name="T19"><text:line-break/><text:tab/>The ATmega4809 uses different physical pins and I/O register addresses than the ATmega32A, but the three-signal decision tree (WAIT → A0 →WR → read) is identical in structure. This is the signature of porting the same source code to a different MCU, not independent design. <text:s text:c="2"/></text:span><text:span text:style-name="T20">Furthermore due to specific portability options inside the original source macros, it would be very easy to reassign pin values inside Arduino and simply recompile the source.</text:span> </text:p>
      <text:p text:style-name="P47"><text:span text:style-name="T10">Legal Analysis:</text:span></text:p>
      <text:p text:style-name="Standard">I am not a lawyer, but the compliance issue is straightforward enough to describe in technical terms. The upstream Z80-MBC2 project is publicly declared GPLv3, and GPLv3 requires that conveyed modified versions and object-code distributions carry the proper license notices and corresponding source access.</text:p>
      <text:p text:style-name="Standard"/>
      <text:p text:style-name="Standard">The apparent compliance failures are:</text:p>
      <text:list text:style-name="L3">
        <text:list-item>
          <text:p text:style-name="P41"><text:span text:style-name="T7">GPLv3 §6 </text:span>— Corresponding Source for non-source distribution. Conveying object code derived from GPLv3 software requires providing Corresponding Source or a valid written source offer through one of the methods allowed by GPLv3 §6. The developer publicly stated that the IOS source “was never published and won’t be in the future.”</text:p>
        </text:list-item>
        <text:list-item>
          <text:p text:style-name="P41"><text:span text:style-name="T7">GPLv3 §5</text:span> — Modified versions. A modified or ported GPLv3 program must carry appropriate notices and the whole work must be licensed under GPLv3 when conveyed. The MBC3 IOS firmware is presented as closed-source firmware with no GPL declaration.</text:p>
        </text:list-item>
        <text:list-item>
          <text:p text:style-name="P41"><text:span text:style-name="T7">GPLv3 notice and license-copy obligations</text:span>. GPLv3 requires preservation of copyright/license notices and conveyance under the license terms. No GPL notice, attribution to the Z80-MBC2 IOS, or GPL license copy has been identified with IOS-S40427.</text:p>
        </text:list-item>
        <text:list-item>
          <text:p text:style-name="P50"><text:span text:style-name="Strong_20_Emphasis">Commercial dimension</text:span> The developer sells Z80‑MBC3 hardware boards; commercial distributors of GPL‑derived software are held to the same, and arguably higher, standard of GPL compliance. The combination of commercial sale and explicit refusal to provide source is the clearest form of GPL violation.</text:p>
        </text:list-item>
      </text:list>
      <text:h text:style-name="P34" text:outline-level="2"><text:soft-page-break/>Where does this leave us then?</text:h>
      <text:p text:style-name="P54"><text:tab/>What is so strange is the reason behind doing something like this. The maker used protected code but failed to release the source for the corresponding project. I am uncertain what the gain is here. The maker released all the schematics and gerber files to produce boards, released documentation on how to use the offending firmware package to flash the firmware, and even names the original project as if his project is the literal successor to it. It is confusing, and frustrating to say the least.</text:p>
      <text:p text:style-name="P24"><text:tab/>Generally speaking, the hope is that the maker will do the right thing, release the source code, and then continue to sell boards, develop the project, and provide support (or not; that is not a requirement of the license). If that does not happen, it is hard to say what will happen next; only time can tell.</text:p>
      <text:p text:style-name="P24"><text:tab/>What I will do is follow up with several agencies who support these kinds of projects. I will be sending copies along with compliance requests to Lectronz and GitHub in approximately ten days from the release of this. I had believed, and still do believe, that this is a giant misunderstanding. But at this point the number of chances and kind requests to do the right thing have gone along the wayside. If by that time the maker decides to at the bare minimum respond with a timetable of when compliance can happen, then we can discuss other outcomes. I just do not see any other recourse that is both fair and reasonable.</text:p>
      <text:p text:style-name="P57"><text:span text:style-name="T21"><text:tab/></text:span>If you have built a Z80‑MBC3 and have been told by the maker that the source code for the firmware would not be released to you, I encourage you to leave a comment and get in touch. I want to assure all of you that this is not about your use or purchase of the project. If for any reason the end result is that the firmware files are no longer available from the maker’s usual locations, I will do everything in my power to produce and release <text:span text:style-name="Strong_20_Emphasis">compliant firmware</text:span>. If you are interested in helping with that as a project, please leave a comment as well.</text:p>
      <text:p text:style-name="P24"><text:tab/>That is about it. I hope everything works out for the maker and for his project. In my experience, situations like this usually do work out, and there is still time for a positive outcome.</text:p>
      <text:p text:style-name="P5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ack" svg:font-family="Hack" style:font-adornments="Regular"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0T13:59:54.078259765</meta:creation-date>
    <dc:date>2026-05-21T22:03:12.937187058</dc:date>
    <meta:editing-duration>PT9H52M44S</meta:editing-duration>
    <meta:editing-cycles>9</meta:editing-cycles>
    <meta:generator>LibreOffice/24.2.7.2$Linux_X86_64 LibreOffice_project/420$Build-2</meta:generator>
    <meta:document-statistic meta:table-count="3" meta:image-count="1" meta:object-count="0" meta:page-count="9" meta:paragraph-count="280" meta:word-count="3436" meta:character-count="20546" meta:non-whitespace-character-count="17239"/>
  </office:meta>
</office:document-meta>
</file>